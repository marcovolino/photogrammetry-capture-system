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number-columns-repeated="3" table:style-name="ce1"/>
          <table:table-cell office:value-type="string" table:style-name="ce1">
            <text:p>Inches</text:p>
          </table:table-cell>
          <table:table-cell office:value-type="string" table:style-name="ce1">
            <text:p>C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T</text:p>
          </table:table-cell>
          <table:table-cell office:value-type="float" office:value="14043" table:style-name="ce1">
            <text:p>14043</text:p>
          </table:table-cell>
          <table:table-cell office:value-type="string" table:style-name="ce1">
            <text:p>Pixels</text:p>
          </table:table-cell>
          <table:table-cell office:value-type="float" office:value="46.81" table:formula="of:=[.B2]/300" table:style-name="ce1">
            <text:p>46.81</text:p>
          </table:table-cell>
          <table:table-cell office:value-type="float" office:value="118.8974" table:formula="of:=[.D2]*2.54" table:style-name="ce1">
            <text:p>118.8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</text:p>
          </table:table-cell>
          <table:table-cell office:value-type="float" office:value="9933" table:style-name="ce1">
            <text:p>9933</text:p>
          </table:table-cell>
          <table:table-cell office:value-type="string" table:style-name="ce1">
            <text:p>Pixels</text:p>
          </table:table-cell>
          <table:table-cell office:value-type="float" office:value="33.11" table:formula="of:=[.B3]/300" table:style-name="ce1">
            <text:p>33.11</text:p>
          </table:table-cell>
          <table:table-cell office:value-type="float" office:value="84.099400000000003" table:formula="of:=[.D3]*2.54" table:style-name="ce1">
            <text:p>84.0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quar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quar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0.65" table:style-name="ce1">
            <text:p>0.65</text:p>
          </table:table-cell>
          <table:table-cell table:style-name="ce1"/>
          <table:table-cell office:value-type="float" office:value="2.1666666666666666E-3" table:formula="of:=[.B6]/300" table:style-name="ce1">
            <text:p>0.002166667</text:p>
          </table:table-cell>
          <table:table-cell office:value-type="float" office:value="5.5033333333333332E-3" table:formula="of:=[.D6]*2.54" table:style-name="ce1">
            <text:p>0.0055033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58.5" table:formula="of:=0.1*[.B12]" table:style-name="ce1">
            <text:p>58.5</text:p>
          </table:table-cell>
          <table:table-cell table:style-name="ce1"/>
          <table:table-cell office:value-type="float" office:value="0.19500000000000001" table:formula="of:=[.B7]/300" table:style-name="ce1">
            <text:p>0.195</text:p>
          </table:table-cell>
          <table:table-cell office:value-type="float" office:value="0.49530000000000002" table:formula="of:=[.D7]*2.54" table:style-name="ce1">
            <text:p>0.49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_W</text:p>
          </table:table-cell>
          <table:table-cell office:value-type="float" office:value="988.94366197183103" table:formula="of:=[.B2]/([.B4]+([.B4]-1)*[.B6])" table:style-name="ce1">
            <text:p>988.943662</text:p>
          </table:table-cell>
          <table:table-cell table:style-name="ce1"/>
          <table:table-cell office:value-type="float" office:value="3.2964788732394368" table:formula="of:=[.B8]/300" table:style-name="ce1">
            <text:p>3.296478873</text:p>
          </table:table-cell>
          <table:table-cell office:value-type="float" office:value="8.3730563380281691" table:formula="of:=[.D8]*2.54" table:style-name="ce1">
            <text:p>8.3730563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_H</text:p>
          </table:table-cell>
          <table:table-cell office:value-type="float" office:value="911.28440366972472" table:formula="of:=[.B3]/([.B5]+([.B5]-1)*[.B6])" table:style-name="ce1">
            <text:p>911.2844037</text:p>
          </table:table-cell>
          <table:table-cell table:style-name="ce1"/>
          <table:table-cell office:value-type="float" office:value="3.0376146788990823" table:formula="of:=[.B9]/300" table:style-name="ce1">
            <text:p>3.037614679</text:p>
          </table:table-cell>
          <table:table-cell office:value-type="float" office:value="7.7155412844036695" table:formula="of:=[.D9]*2.54" table:style-name="ce1">
            <text:p>7.71554128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0" table:formula="of:=[.B10]/300" table:style-name="ce1">
            <text:p>0</text:p>
          </table:table-cell>
          <table:table-cell office:value-type="float" office:value="0" table:formula="of:=[.D10]*2.54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900" table:style-name="ce1">
            <text:p>900</text:p>
          </table:table-cell>
          <table:table-cell table:style-name="ce1"/>
          <table:table-cell office:value-type="float" office:value="3" table:formula="of:=[.B11]/300" table:style-name="ce1">
            <text:p>3</text:p>
          </table:table-cell>
          <table:table-cell office:value-type="float" office:value="7.62" table:formula="of:=[.D11]*2.54" table:style-name="ce1">
            <text:p>7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585" table:formula="of:=[.B11]*[.B6]" table:style-name="ce1">
            <text:p>585</text:p>
          </table:table-cell>
          <table:table-cell table:style-name="ce1"/>
          <table:table-cell office:value-type="float" office:value="1.95" table:formula="of:=[.B12]/300" table:style-name="ce1">
            <text:p>1.95</text:p>
          </table:table-cell>
          <table:table-cell office:value-type="float" office:value="4.9530000000000003" table:formula="of:=[.D12]*2.54" table:style-name="ce1">
            <text:p>4.9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.2" table:formula="of:=[.B13]/300" table:style-name="ce1">
            <text:p>0.2</text:p>
          </table:table-cell>
          <table:table-cell office:value-type="float" office:value="0.50800000000000001" table:formula="of:=[.D13]*2.54" table:style-name="ce1">
            <text:p>0.508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0" table:formula="of:=[.B14]/300" table:style-name="ce1">
            <text:p>0</text:p>
          </table:table-cell>
          <table:table-cell office:value-type="float" office:value="0" table:formula="of:=[.D14]*2.54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_F</text:p>
          </table:table-cell>
          <table:table-cell office:value-type="float" office:value="12900" table:formula="of:=[.B4]*[.B11]+([.B4]-1)*[.B6]*[.B11]+2*[.B13]" table:style-name="ce1">
            <text:p>12900</text:p>
          </table:table-cell>
          <table:table-cell table:style-name="ce1"/>
          <table:table-cell office:value-type="float" office:value="43" table:formula="of:=[.B15]/300" table:style-name="ce1">
            <text:p>43</text:p>
          </table:table-cell>
          <table:table-cell office:value-type="float" office:value="109.22" table:formula="of:=[.D15]*2.54" table:style-name="ce1">
            <text:p>109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_F</text:p>
          </table:table-cell>
          <table:table-cell office:value-type="float" office:value="9930" table:formula="of:=[.B5]*[.B11]+([.B5]-1)*[.B11]*[.B6]+2*[.B13]" table:style-name="ce1">
            <text:p>9930</text:p>
          </table:table-cell>
          <table:table-cell table:style-name="ce1"/>
          <table:table-cell office:value-type="float" office:value="33.1" table:formula="of:=[.B16]/300" table:style-name="ce1">
            <text:p>33.1</text:p>
          </table:table-cell>
          <table:table-cell office:value-type="float" office:value="84.073999999999998" table:formula="of:=[.D16]*2.54" table:style-name="ce1">
            <text:p>84.074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21</meta:generator>
    <dc:creator>Volino, Marco Dr (CVSSP)</dc:creator>
    <meta:creation-date>2018-12-05T13:00:36Z</meta:creation-date>
    <dc:date>2026-06-30T21:25:38Z</dc:date>
    <meta:editing-cycles>3</meta:editing-cycles>
    <meta:editing-duration>PT4226S</meta:editing-duration>
  </office:meta>
</office:document-meta>
</file>